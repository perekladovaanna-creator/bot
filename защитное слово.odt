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365e3" officeooo:paragraph-rsid="001365e3" style:font-weight-asian="bold" style:font-weight-complex="bold"/>
    </style:style>
    <style:style style:name="P2" style:family="paragraph" style:parent-style-name="Standard">
      <style:text-properties officeooo:rsid="001365e3" officeooo:paragraph-rsid="001365e3"/>
    </style:style>
    <style:style style:name="P3" style:family="paragraph" style:parent-style-name="Standard">
      <style:text-properties officeooo:rsid="00180b72" officeooo:paragraph-rsid="00180b72"/>
    </style:style>
    <style:style style:name="P4" style:family="paragraph" style:parent-style-name="Standard">
      <style:text-properties officeooo:rsid="0018268b" officeooo:paragraph-rsid="0018268b"/>
    </style:style>
    <style:style style:name="P5" style:family="paragraph" style:parent-style-name="Standard">
      <style:text-properties officeooo:rsid="001365e3" officeooo:paragraph-rsid="00265773"/>
    </style:style>
    <style:style style:name="P6" style:family="paragraph" style:parent-style-name="Standard">
      <style:text-properties officeooo:rsid="00265773" officeooo:paragraph-rsid="00265773"/>
    </style:style>
    <style:style style:name="P7" style:family="paragraph" style:parent-style-name="Standard">
      <style:text-properties fo:font-weight="bold" officeooo:rsid="0016a42f" officeooo:paragraph-rsid="0016a42f" style:font-weight-asian="bold" style:font-weight-complex="bold"/>
    </style:style>
    <style:style style:name="P8" style:family="paragraph" style:parent-style-name="Standard">
      <style:text-properties fo:font-weight="normal" officeooo:rsid="001eb578" officeooo:paragraph-rsid="001eb578" style:font-weight-asian="normal" style:font-weight-complex="normal"/>
    </style:style>
    <style:style style:name="P9" style:family="paragraph" style:parent-style-name="Standard">
      <style:text-properties officeooo:rsid="001eb578" officeooo:paragraph-rsid="001eb578"/>
    </style:style>
    <style:style style:name="P10" style:family="paragraph" style:parent-style-name="Standard">
      <style:text-properties officeooo:rsid="0016a42f" officeooo:paragraph-rsid="001eb578"/>
    </style:style>
    <style:style style:name="P11" style:family="paragraph" style:parent-style-name="Standard">
      <style:text-properties fo:font-weight="bold" officeooo:rsid="0018268b" officeooo:paragraph-rsid="002844bf" style:font-weight-asian="bold" style:font-weight-complex="bold"/>
    </style:style>
    <style:style style:name="P12" style:family="paragraph" style:parent-style-name="Standard">
      <style:text-properties officeooo:rsid="0018268b" officeooo:paragraph-rsid="002844bf"/>
    </style:style>
    <style:style style:name="P13" style:family="paragraph" style:parent-style-name="Standard">
      <style:text-properties officeooo:rsid="002844bf" officeooo:paragraph-rsid="002844bf"/>
    </style:style>
    <style:style style:name="T1" style:family="text">
      <style:text-properties officeooo:rsid="001eb578"/>
    </style:style>
    <style:style style:name="T2" style:family="text">
      <style:text-properties officeooo:rsid="00221c9c"/>
    </style:style>
    <style:style style:name="T3" style:family="text">
      <style:text-properties officeooo:rsid="0020309f"/>
    </style:style>
    <style:style style:name="T4" style:family="text">
      <style:text-properties officeooo:rsid="0026577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a42f" style:font-weight-asian="bold" style:font-weight-complex="bold"/>
    </style:style>
    <style:style style:name="T7" style:family="text">
      <style:text-properties officeooo:rsid="001365e3"/>
    </style:style>
    <style:style style:name="T8" style:family="text">
      <style:text-properties officeooo:rsid="002844bf"/>
    </style:style>
    <style:style style:name="T9" style:family="text">
      <style:text-properties officeooo:rsid="001dac8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41edb" style:font-weight-asian="normal" style:font-weight-complex="normal"/>
    </style:style>
    <style:style style:name="T12" style:family="text">
      <style:text-properties fo:language="en" fo:country="US" fo:font-weight="normal" officeooo:rsid="00241edb" style:font-weight-asian="normal" style:font-weight-complex="normal"/>
    </style:style>
    <style:style style:name="T13" style:family="text">
      <style:text-properties officeooo:rsid="0016a42f"/>
    </style:style>
    <style:style style:name="T14" style:family="text">
      <style:text-properties officeooo:rsid="0022b5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ктуальность проблемы</text:p>
      <text:p text:style-name="P2">Почему фишинг — «лидер среди схем мошенничества»</text:p>
      <text:p text:style-name="P2">Объём фишинг-атак продолжает расти. <text:span text:style-name="T1">Конкретный пример вы можете видеть на слайде</text:span>. <text:span text:style-name="T2">Это</text:span><text:span text:style-name="T3"> человеческий фактор. Неважно, насколько защищён ваш сервер, если сотрудник перешёл по ссылке и ввёл свои учётные данные. пользователи интернета часто переходят по подозрительным ссылкам. </text:span><text:span text:style-name="T4">так же мой проект соотвествует Матрице MITRE ATT&amp;CK T1566: а именно Фишинг <text:s/></text:span></text:p>
      <text:p text:style-name="P3"><text:span text:style-name="T5">Именно по этому т</text:span><text:span text:style-name="T6">ема </text:span><text:span text:style-name="T5">моего проекта</text:span><text:span text:style-name="T6">:</text:span><text:span text:style-name="T7"> разработка Telegram-бота для проверки ссылок через VirusTotal.</text:span></text:p>
      <text:p text:style-name="P2">Задачи: (<text:span text:style-name="T8">на слайде</text:span>)</text:p>
      <text:p text:style-name="P4"><text:span text:style-name="T5">Аналоги</text:span> </text:p>
      <text:p text:style-name="P2">Существует различные решения этой проблемы, такие как: </text:p>
      <text:p text:style-name="P2"><text:span text:style-name="T8">1. </text:span>Решения «снаружи» Ручная проверка (VirusTotal и аналоги). Но  этот способ имеет большой недостаток — занимает слишком много времени. Он требует 5-7 действий: копирование ссылки, переход в браузер, открытие сайта, вставка, запуск проверки, анализ результатов, что не удобно в процессе переписки. Браузерные расширения. <text:span text:style-name="T9">Минус этого способа в том, что </text:span>очень часто браузеры предупреждают уже при переходе по <text:span text:style-name="T9">подозрительной </text:span>ссылке, что может быть слишком поздно.  Корпоративные решения, такие как Sandbox, Secure Web Gateways. Но к сожалению они предназначены для сетей целых организаций и недоступны для частных лиц или малых групп.</text:p>
      <text:p text:style-name="P2"><text:span text:style-name="T1">У</text:span>гроза актуальна внутри мессенджеров, а все инструменты работают «снаружи», требуя активных действий от пользователя.</text:p>
      <text:p text:style-name="P5">«антивирус» <text:s/>в виде Telegram-бота. Это быстрое и общедоступное решение. </text:p>
      <text:p text:style-name="P6"><text:span text:style-name="T8">2. </text:span>Аналогичные боты </text:p>
      <text:p text:style-name="P6">так как аудитория моего бота все пользователи телеграмм, мой бот наиболее подходящий, отличается понятным для каждого выводом информации </text:p>
      <text:p text:style-name="P7">Разработка</text:p>
      <text:p text:style-name="P8">принцип работы</text:p>
      <text:p text:style-name="P9"><text:span text:style-name="T10">Бот из текста отправленного пользователем извлекает URL-адрес. Далее каждый уникальный URL отправляется в VirusTotal API</text:span><text:span text:style-name="T11">(Основное применение WHOIS — получение регистрационных данных о владельцах доменных имён, IP-адресов и автономных систем)</text:span><text:span text:style-name="T10">. Полученный JSON-отчёт </text:span><text:span text:style-name="T12"><text:s/>(JavaScript Object Notation)</text:span><text:span text:style-name="T10">анализируется по набору правил: репутация домена, результаты сканирования 70+ антивирусов, данные о поведении. На основе анализа формируется понятный вердикт, который бот отправляет обратно в пользователю. Пользователь получает сообщение: </text:span><text:span text:style-name="T13">все хорошо! выглядит безопасно! в случае если ссылка не несет угроз, или:</text:span></text:p>
      <text:p text:style-name="P10">«будь осторожен!», «не переходи!», в зависимости от результата полученного от VirusTotal. мощью библиотек aiogram, asynciо <text:span text:style-name="T14">(д</text:span>екораторы — это функции, которые принимают другую функцию в качестве аргумента<text:span text:style-name="T14">)</text:span></text:p>
      <text:p text:style-name="P4">Так же имеется обратная связь у разработчика с ботом. Т е в колсоли он может видеть сообщение об удачном или неудачном запуске бота.</text:p>
      <text:p text:style-name="P4">Бот запускается командой /start в личном чате с ботом. Далее пользователь получает сообщение с правилами пользования ботом: </text:p>
      <text:p text:style-name="P11">в перспективе </text:p>
      <text:p text:style-name="P12">добавить <text:s/>автоматизацию боту, то есть убрать необходимость пересылать ему ссылк<text:span text:style-name="T8">и</text:span></text:p>
      <text:p text:style-name="P12">разработать ботов для других мессенджеров (например ватсап, макс, вк)</text:p>
      <text:p text:style-name="P13">выложить на онлайн хостинг 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Vivid2_7e_LT_7e_Untertitel" style:display-name="Vivid2~LT~Untertitel" style:family="paragraph">
      <style:paragraph-properties fo:text-align="center" style:justify-single-word="false"/>
      <style:text-properties fo:color="#009eda" loext:opacity="100%" style:text-outline="false" style:text-line-through-style="none" style:text-line-through-type="none" style:font-name="Noto Sans" fo:font-family="'Noto Sans'" style:font-family-generic="roman" style:font-pitch="variable" fo:font-size="40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40pt" style:font-style-asian="normal" style:font-weight-asian="bold" style:font-name-complex="Calibri" style:font-family-complex="Calibri" style:font-family-generic-complex="system" style:font-pitch-complex="variable" style:font-size-complex="12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21:30:48.206320500</meta:creation-date>
    <dc:date>2026-01-15T14:28:59.621772100</dc:date>
    <meta:editing-duration>PT1H29M26S</meta:editing-duration>
    <meta:editing-cycles>6</meta:editing-cycles>
    <meta:generator>LibreOffice/25.2.7.2$Windows_X86_64 LibreOffice_project/5cbfd1ab6520636bb5f7b99185aa69bd7456825d</meta:generator>
    <meta:print-date>2025-12-10T21:16:52.235110300</meta:print-date>
    <meta:document-statistic meta:table-count="0" meta:image-count="0" meta:object-count="0" meta:page-count="1" meta:paragraph-count="22" meta:word-count="377" meta:character-count="2855" meta:non-whitespace-character-count="2481"/>
  </office:meta>
</office:document-meta>
</file>