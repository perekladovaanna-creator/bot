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16831DCFD55.png" manifest:media-type="image/png"/>
  <manifest:file-entry manifest:full-path="Pictures/1000000100000302000002D04BF0BE1B.png" manifest:media-type="image/png"/>
  <manifest:file-entry manifest:full-path="Pictures/100000010000028D00000159652D5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fo:orphans="0" fo:widows="0" fo:text-indent="1.251cm" style:auto-text-indent="false" style:page-number="1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text-indent="1.251cm" style:auto-text-indent="false">
        <style:tab-stops>
          <style:tab-stop style:position="16.708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text-indent="1.251cm" style:auto-text-indent="false">
        <style:tab-stops>
          <style:tab-stop style:position="16.708cm"/>
        </style:tab-stops>
      </style:paragraph-properties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text-indent="1.251cm" style:auto-text-indent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text-indent="1.251cm" style:auto-text-indent="false" fo:background-color="#ffffff"/>
      <style:text-properties fo:font-size="14pt" style:font-size-asian="14pt" style:font-size-complex="14pt" style:font-style-complex="italic" style:font-weight-complex="bold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end" style:justify-single-word="false" fo:text-indent="1.251cm" style:auto-text-indent="false"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  <style:text-properties fo:font-size="14pt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reak-before="page" fo:background-color="#ffffff"/>
    </style:style>
    <style:style style:name="P11" style:family="paragraph" style:parent-style-name="Normal_20__28_Web_29_" style:list-style-name="WWNum4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12" style:family="paragraph" style:parent-style-name="List_20_Paragraph" style:list-style-name="WWNum4">
      <style:paragraph-properties fo:margin-top="0cm" fo:margin-bottom="0cm" style:contextual-spacing="false" fo:line-height="150%"/>
    </style:style>
    <style:style style:name="P13" style:family="paragraph" style:parent-style-name="Normal_20__28_Web_29_">
      <loext:graphic-properties draw:fill="solid" draw:fill-color="#ffffff"/>
      <style:paragraph-properties fo:margin-left="1.27cm" fo:margin-top="0cm" fo:margin-bottom="0cm" style:contextual-spacing="false" fo:line-height="150%" fo:text-align="justify" style:justify-single-word="false" fo:background-color="#ffffff"/>
      <style:text-properties fo:font-size="14pt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03ab68" officeooo:paragraph-rsid="0003ab68" style:font-size-asian="14pt" style:font-name-complex="Times New Roman1" style:font-size-complex="14pt"/>
    </style:style>
    <style:style style:name="P20" style:family="paragraph" style:parent-style-name="List_20_Paragraph" style:list-style-name="WWNum1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21" style:family="paragraph" style:parent-style-name="List_20_Paragraph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Standard" style:list-style-name="WWNum9">
      <style:paragraph-properties fo:margin-top="0cm" fo:margin-bottom="0cm" style:contextual-spacing="false" fo:line-height="150%" fo:text-align="justify" style:justify-single-word="false"/>
    </style:style>
    <style:style style:name="P26" style:family="paragraph" style:parent-style-name="Standard" style:list-style-name="WWNum5">
      <style:paragraph-properties fo:margin-left="1.3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-0.6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">
      <style:paragraph-properties fo:margin-left="1.3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WWNum6">
      <style:paragraph-properties fo:margin-top="0cm" fo:margin-bottom="0cm" style:contextual-spacing="false" fo:line-height="150%" fo:text-align="justify" style:justify-single-word="false"/>
    </style:style>
    <style:style style:name="P30" style:family="paragraph" style:parent-style-name="Standard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</style:style>
    <style:style style:name="P32" style:family="paragraph" style:parent-style-name="Standard" style:list-style-name="WWNum7">
      <style:paragraph-properties fo:margin-top="0cm" fo:margin-bottom="0cm" style:contextual-spacing="false" fo:line-height="150%" fo:text-align="justify" style:justify-single-word="false"/>
    </style:style>
    <style:style style:name="P33" style:family="paragraph" style:parent-style-name="Standard" style:list-style-name="WWNum8">
      <style:paragraph-properties fo:margin-top="0cm" fo:margin-bottom="0cm" style:contextual-spacing="false" fo:line-height="150%" fo:text-align="justify" style:justify-single-word="false"/>
    </style:style>
    <style:style style:name="P34" style:family="paragraph" style:parent-style-name="Standard" style:list-style-name="WWNum3">
      <style:paragraph-properties fo:margin-top="0cm" fo:margin-bottom="0cm" style:contextual-spacing="false" fo:line-height="150%" fo:text-align="justify" style:justify-single-word="false"/>
    </style:style>
    <style:style style:name="P35" style:family="paragraph" style:parent-style-name="List_20_Paragraph">
      <style:paragraph-properties fo:margin-left="0cm" fo:margin-top="0cm" fo:margin-bottom="0cm" style:contextual-spacing="true" fo:line-height="150%" fo:text-align="center" style:justify-single-word="false" fo:break-before="page"/>
    </style:style>
    <style:style style:name="P36" style:family="paragraph" style:parent-style-name="List_20_Paragraph">
      <style:paragraph-properties fo:margin-left="0cm" fo:margin-top="0cm" fo:margin-bottom="0cm" style:contextual-spacing="true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Drawing">
      <style:paragraph-properties fo:text-align="start" style:justify-single-word="false"/>
    </style:style>
    <style:style style:name="P38" style:family="paragraph" style:parent-style-name="Drawing">
      <style:paragraph-properties fo:margin-top="0cm" fo:margin-bottom="0.353cm" style:contextual-spacing="false" fo:text-align="end" style:justify-single-word="false"/>
      <style:text-properties fo:color="#000000" loext:opacity="100%"/>
    </style:style>
    <style:style style:name="P3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0" style:family="paragraph" style:parent-style-name="List_20_Paragraph">
      <style:paragraph-properties fo:margin-left="0cm" fo:margin-top="0cm" fo:margin-bottom="0cm" style:contextual-spacing="true" fo:line-height="150%" fo:text-align="justify" style:justify-single-word="false"/>
    </style:style>
    <style:style style:name="P41" style:family="paragraph" style:parent-style-name="Рисунок">
      <style:paragraph-properties fo:margin-top="0cm" fo:margin-bottom="0.353cm" style:contextual-spacing="false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style-complex="italic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>
        <loext:char-complex-color loext:theme-type="accent1" loext:color-type="theme"/>
      </style:text-properties>
    </style:style>
    <style:style style:name="T19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0.271cm" fo:min-width="17.173cm" fo:padding-top="0cm" fo:padding-bottom="0cm" fo:padding-left="0cm" fo:padding-right="0cm" fo:wrap-option="wrap" loext:decorative="false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8.733cm" fo:min-width="14.78cm" fo:padding-top="0cm" fo:padding-bottom="0cm" fo:padding-left="0cm" fo:padding-right="0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9.285cm" fo:min-width="17.281cm" fo:padding-top="0cm" fo:padding-bottom="0cm" fo:padding-left="0cm" fo:padding-right="0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пециализированный учебно-научный центр федерального государственного автономного образовательного учреждения высшего образования «Уральский федеральный университет имени первого Президента России Б.Н. Ельцина»</text:span></text:p>
      <text:p text:style-name="P2" loext:marker-style-name="T1"/>
      <text:p text:style-name="P3" loext:marker-style-name="T2"/>
      <text:p text:style-name="P3" loext:marker-style-name="T2"/>
      <text:p text:style-name="P3" loext:marker-style-name="T2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5"><text:span text:style-name="T3">Проект </text:span></text:p>
      <text:p text:style-name="P5"><text:span text:style-name="T4">Разработка Telegram-бота для проверки ссылок через VirusTotal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7"><text:span text:style-name="T3">Автор проекта: А.А. Перекладова</text:span></text:p>
      <text:p text:style-name="P8" loext:marker-style-name="T3"/>
      <text:p text:style-name="P8" loext:marker-style-name="T3"/>
      <text:p text:style-name="P9" loext:marker-style-name="T3"><text:span text:style-name="T3">Екатеринбург</text:span><text:span text:style-name="T3"/></text:p>
      <text:p text:style-name="P5"><text:span text:style-name="T3">2025</text:span></text:p>
      <text:p text:style-name="P10" loext:marker-style-name="T5"><text:span text:style-name="T5">Содержание </text:span><text:span text:style-name="T5"/></text:p>
      <text:list text:style-name="WWNum4">
        <text:list-item>
          <text:p text:style-name="P11" loext:marker-style-name="T3"><text:span text:style-name="T3">Введение……………………….…………………………………...……..3</text:span><text:span text:style-name="T3"/></text:p>
        </text:list-item>
        <text:list-item>
          <text:p text:style-name="P12" loext:marker-style-name="T6"><text:span text:style-name="T7">Теоретическая часть….…………………………………………………..4</text:span><text:span text:style-name="T7"/></text:p>
          <text:list>
            <text:list-item>
              <text:p text:style-name="P12" loext:marker-style-name="T6"><text:span text:style-name="T7">Анализ проблемы и существующих решений…………………...4</text:span><text:span text:style-name="T7"/></text:p>
            </text:list-item>
            <text:list-item>
              <text:p text:style-name="P12" loext:marker-style-name="T6"><text:span text:style-name="T7">Концепция решения………………………………………………..6</text:span><text:span text:style-name="T7"/></text:p>
            </text:list-item>
            <text:list-item>
              <text:p text:style-name="P12" loext:marker-style-name="T6"><text:span text:style-name="T7">Области применения……………………………………………….7</text:span><text:span text:style-name="T7"/></text:p>
            </text:list-item>
          </text:list>
        </text:list-item>
        <text:list-item>
          <text:p text:style-name="P12" loext:marker-style-name="T6"><text:span text:style-name="T7">Практическая часть.………………….…………………………………...8</text:span><text:span text:style-name="T7"/></text:p>
          <text:list>
            <text:list-item>
              <text:p text:style-name="P12" loext:marker-style-name="T6"><text:span text:style-name="T7">Описание проектного решения……………………………………8</text:span><text:span text:style-name="T7"/></text:p>
            </text:list-item>
            <text:list-item>
              <text:p text:style-name="P12" loext:marker-style-name="T6"><text:span text:style-name="T7">Принцип работы……………………………………………………9</text:span><text:span text:style-name="T7"/></text:p>
            </text:list-item>
          </text:list>
        </text:list-item>
        <text:list-item>
          <text:p text:style-name="P12" loext:marker-style-name="T6"><text:span text:style-name="T7">Заключение.…………………..…………………………………………..10</text:span><text:span text:style-name="T7"/></text:p>
        </text:list-item>
        <text:list-item>
          <text:p text:style-name="P12" loext:marker-style-name="T6"><text:span text:style-name="T7">Список литературы……………………………………………………....11</text:span><text:span text:style-name="T7"/></text:p>
        </text:list-item>
        <text:list-item>
          <text:p text:style-name="P12" loext:marker-style-name="T6"><text:span text:style-name="T7">Приложение……………………………………………………………....13</text:span><text:span text:style-name="T7"/></text:p>
        </text:list-item>
      </text:list>
      <text:p text:style-name="P13" loext:marker-style-name="T3"/>
      <text:p text:style-name="P14" loext:marker-style-name="T3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6" loext:marker-style-name="T8"/>
      <text:p text:style-name="P16" loext:marker-style-name="T8"/>
      <text:p text:style-name="P17" loext:marker-style-name="T6"><text:span text:style-name="T8">Введение</text:span><text:span text:style-name="T8"/></text:p>
      <text:p text:style-name="P18" loext:marker-style-name="T6"><text:span text:style-name="T8">Актуальность проблемы: </text:span><text:span text:style-name="T1">В условиях роста киберугроз пользователи Telegram часто сталкиваются с фишингом, вредоносными ссылками и мошенничеством. Проверка ссылок вручную через специализированные сервисы требует времени и навыков.</text:span></text:p>
      <text:p text:style-name="P18" loext:marker-style-name="T6"><text:span text:style-name="T8">Тема проекта:</text:span><text:span text:style-name="T1"> разработка Telegram-бота для проверки ссылок через VirusTotal.</text:span></text:p>
      <text:p text:style-name="P19" loext:marker-style-name="T9"><text:span text:style-name="T10">Цель</text:span><text:span text:style-name="T10">:</text:span> <text:span text:style-name="T11">уменьшить количество жертв от фишинга</text:span></text:p>
      <text:p text:style-name="P18" loext:marker-style-name="T6"><text:span text:style-name="T8">Задачи</text:span><text:span text:style-name="T1">: </text:span></text:p>
      <text:list text:style-name="WWNum1">
        <text:list-item>
          <text:p text:style-name="P20" loext:marker-style-name="T6"><text:span text:style-name="T1">Изучить работу VirusTotal API (Application Programming Interface).</text:span><text:span text:style-name="T1"/></text:p>
        </text:list-item>
        <text:list-item>
          <text:p text:style-name="P20" loext:marker-style-name="T6"><text:span text:style-name="T1">Разработать Telegram-бот.</text:span><text:span text:style-name="T1"/></text:p>
        </text:list-item>
        <text:list-item>
          <text:p text:style-name="P20" loext:marker-style-name="T6"><text:span text:style-name="T1">Реализовать обработку ссылок и анализ полученных данных.</text:span><text:span text:style-name="T1"/></text:p>
        </text:list-item>
        <text:list-item>
          <text:p text:style-name="P20" loext:marker-style-name="T1"><text:span text:style-name="T1">Провести тестирование</text:span><text:span text:style-name="T1"/></text:p>
        </text:list-item>
      </text:list>
      <text:p text:style-name="P21" loext:marker-style-name="T1"/>
      <text:p text:style-name="P22" loext:marker-style-name="T8"><text:span text:style-name="T8">Теоретическая часть</text:span><text:span text:style-name="T8"/></text:p>
      <text:p text:style-name="P23" loext:marker-style-name="T8"><text:span text:style-name="T8">Анализ проблемы и существующих решений</text:span><text:span text:style-name="T8"/></text:p>
      <text:p text:style-name="P24" loext:marker-style-name="T12"><text:span text:style-name="T12"><text:tab/>Фишинг (от английского phishing, созвучного с fishing — «рыбная ловля, выуживание») — вид интернет-мошенничества, при котором злоумышленники пытаются выманить конфиденциальные сведения.</text:span><text:span text:style-name="T12"/></text:p>
      <text:p text:style-name="P24" loext:marker-style-name="T12"><text:span text:style-name="T12">Смс-фишинг (смишинг) — короткие сообщения со ссылками, обещающие призы, скидки или требующие оплаты. Особенно опасен из-за кажущейся «официальности» SMS-канала.</text:span><text:span text:style-name="T12"/></text:p>
      <text:p text:style-name="P24" loext:marker-style-name="T12"><text:span text:style-name="T12"><text:tab/>Почему фишинг — «лидер среди схем мошенничества»? </text:span><text:span text:style-name="T12"/></text:p>
      <text:list text:style-name="WWNum9">
        <text:list-item>
          <text:p text:style-name="P25"><text:span text:style-name="T12">Фишинг атакует не уязвимости в программном обеспечении (ПО), а слабое звено в системе — человека. Неважно, насколько защищён ваш сервер, если сотрудник перешёл по ссылке и ввёл свои учётные данные. Сложные антивирусы и файрволлы часто бессильны против легитимной на вид ссылки.</text:span></text:p>
        </text:list-item>
      </text:list>
      <text:list text:style-name="WWNum5">
        <text:list-item>
          <text:p text:style-name="P26" loext:marker-style-name="T12"><text:span text:style-name="T12">Мошенники оперативно используют актуальные новости (выплаты, выборы, пандемии, стихийные бедствия), сезонные события (распродажи, налоговый период) и личную информацию из утечек для повышения доверия. Чем больше сторонних онлайн-сервисов использует человек (банки, магазины, госуслуги, облака), тем выше общая поверхность для атаки.</text:span><text:span text:style-name="T12"/></text:p>
        </text:list-item>
        <text:list-item>
          <text:p text:style-name="P26" loext:marker-style-name="T12"><text:span text:style-name="T12">Успешная фишинг-атака часто — это конечная цель, а не первый этап. Полученные логины и пароли дают мгновенный доступ к деньгам, корпоративным сетям или персональной информации для шантажа.</text:span><text:span text:style-name="T12"/></text:p>
        </text:list-item>
      </text:list>
      <text:p text:style-name="P27" loext:marker-style-name="T12"><text:span text:style-name="T12">Почему люди продолжают попадаться?</text:span><text:span text:style-name="T12"/></text:p>
      <text:p text:style-name="P28" loext:marker-style-name="T12"><text:span text:style-name="T12"><text:tab/>В первую очередь это низкий уровень киберграмотности. Кто-то просто не знает базовых правил и продолжает переходить по неожиданным ссылкам, не проверяя отправителя, и скачивать вложения из непроверенных источников. Также мошенники играют на чувствах, вызывая у жертвы различные эмоции, например, страх («Ваш аккаунт будет заблокирован!»), жадность («Вы выиграли приз!»), любопытство («На вас подали жалобу, </text:span><text:soft-page-break/><text:span text:style-name="T12">посмотрите»), желание помочь («Срочно нужны деньги другу»). При таких сообщениях человек перестает задумываться о безопасности. Зачастую пользователи механически кликают «Принять» или «Разрешить», игнорируя предупреждения браузеров и систем безопасности.</text:span><text:span text:style-name="T12"/></text:p>
      <text:p text:style-name="P18" loext:marker-style-name="T1"><text:span text:style-name="T1">В связи с этим существует большая проблема: пользователи интернета часто переходят по подозрительным ссылкам.</text:span><text:span text:style-name="T1"/></text:p>
      <text:p text:style-name="P18" loext:marker-style-name="T6"><text:span text:style-name="T1">В современном информационном пространстве мессенджеры становятся основными платформами для межличностной коммуникации. Эти приложения обеспечивают высокую скорость и удобство обмена текстовыми сообщениями, а также интеграцию ссылок в коммуникационный процесс. Однако данная специфика может быть использована злоумышленниками. Пользователи интернета часто переходят по подозрительным ссылкам. Существуют различные решения этой проблемы, такие как:</text:span><text:span text:style-name="T1"/></text:p>
      <text:list text:style-name="WWNum6">
        <text:list-item>
          <text:p text:style-name="P29"><text:span text:style-name="T1">Ручная проверка безопасности ссылки. Этот способ имеет большой недостаток — занимает слишком много времени. Он требует 5-7 действий: копирование ссылки, переход в браузер, открытие сайта, вставка, запуск проверки, анализ результатов, что не удобно в процессе переписки.</text:span></text:p>
        </text:list-item>
        <text:list-item>
          <text:p text:style-name="P29"><text:span text:style-name="T1">Браузерные расширения. Но очень часто браузеры предупреждают о вредоносности ссылки только при переходе по ссылке, что может быть слишком поздно.</text:span></text:p>
        </text:list-item>
        <text:list-item>
          <text:p text:style-name="P29" loext:marker-style-name="T6"><text:span text:style-name="T1">Корпоративные решения, такие как Sandbox, Secure Web Gateways. К сожалению, они предназначены для сетей целых организаций, требуют администрирования и недоступны для частных лиц или малых групп.</text:span><text:span text:style-name="T1"/></text:p>
        </text:list-item>
      </text:list>
      <text:p text:style-name="P24" loext:marker-style-name="T1"><text:span text:style-name="T1">Таким образом, угроза актуальна в реальном времени внутри мессенджеров, а все инструменты работают «снаружи», требуя активных действий от пользователя.</text:span><text:span text:style-name="T1"/></text:p>
      <text:p text:style-name="P15" loext:marker-style-name="T1"/>
      <text:p text:style-name="P17" loext:marker-style-name="T13"><text:span text:style-name="T13">Концепция решения</text:span><text:span text:style-name="T13"/></text:p>
      <text:p text:style-name="P18" loext:marker-style-name="T1"><text:span text:style-name="T1">Встроенный «антивирус» для чатов Telegram в виде Telegram-бота — это быстрое и общедоступное решение. В бот можно переслать ссылку из переписки, что занимает гораздо меньше действий, в отличие от ручной проверки. Так же этот способ доступен для каждого пользователя Telegram.</text:span><text:span text:style-name="T1"/></text:p>
      <text:p text:style-name="P18" loext:marker-style-name="T1"><text:span text:style-name="T1">Ключевые принципы:</text:span><text:span text:style-name="T1"/></text:p>
      <text:list text:style-name="WWNum2">
        <text:list-item>
          <text:p text:style-name="P30" loext:marker-style-name="T1"><text:span text:style-name="T1">Реализация внутри Telegram, а не где-то снаружи. Пользователю </text:span><text:span text:style-name="T14">не нужно выходить из мессенджера.</text:span></text:p>
        </text:list-item>
        <text:list-item>
          <text:p text:style-name="P30" loext:marker-style-name="T1"><text:span text:style-name="T1">Многоуровневая проверка с использованием VirusTotal API.</text:span><text:span text:style-name="T1"/></text:p>
        </text:list-item>
        <text:list-item>
          <text:p text:style-name="P30" loext:marker-style-name="T1"><text:span text:style-name="T1">Удобство в использовании. Бесплатная базовая версия с быстрой проверкой по публичным базам, простая настройка, пользователю достаточно просто запустить бота.</text:span><text:span text:style-name="T1"/></text:p>
        </text:list-item>
      </text:list>
      <text:p text:style-name="P18" loext:marker-style-name="T1"><text:span text:style-name="T1">Почему бот должен быть в Telegram?</text:span><text:span text:style-name="T1"/></text:p>
      <text:p text:style-name="P18" loext:marker-style-name="T1"><text:span text:style-name="T1">По данным опроса Фонда общественного мнения (ФОМ) на сентябрь 2025 года, Telegram является вторым по популярности мессенджером в России (его используют 46% россиян) и первым по популярности мессенджером среди молодежи (подростков в возрасте от 12 до 23 лет). Также в Telegram существуют публичные каналы и группы, где риск распространения вредоносных ссылок максимален.</text:span><text:span text:style-name="T1"/></text:p>
      <text:p text:style-name="P18" loext:marker-style-name="T1"><text:span text:style-name="T1">Почему должен использоваться VirusTotal API? </text:span><text:span text:style-name="T1"/></text:p>
      <text:p text:style-name="P18" loext:marker-style-name="T1"><text:span text:style-name="T1">VirusTotal API — это оптимальный технологический выбор для такого бота. VirusTotal — это агрегатор, а не просто один сканер. Запрос к его API возвращает результаты 70+ антивирусных движков (Kaspersky, ESET, Bitdefender и др.), данные о домене: возраст, WHOIS (сетевой протокол прикладного уровня), сертификаты SSL, категория сайта, историю URL (когда впервые замечен, как менялась репутация), снимки страниц. Альтернативой VirusTotal API является использование 5-7 разных API (отдельно для WHOIS, отдельно для фишинга и т. д.), что сложнее, дороже, медленнее.</text:span><text:span text:style-name="T1"/></text:p>
      <text:p text:style-name="P22" loext:marker-style-name="T6"><text:span text:style-name="T15">О</text:span><text:span text:style-name="T13">бласти применения</text:span></text:p>
      <text:p text:style-name="P24" loext:marker-style-name="T6"><text:span text:style-name="T13"><text:tab/></text:span><text:span text:style-name="T1">Для индивидуальных пользователей:</text:span></text:p>
      <text:p text:style-name="P24" loext:marker-style-name="T1"><text:span text:style-name="T1">Проект решает критическую проблему цифровой безопасности, предоставляя обычным пользователям Telegram инструмент корпоративного уровня без необходимости установки дополнительного программного обеспечения, изучения сложных интерфейсов, финансовых затрат на подписки. Открытость и доступность позволяет повысить уровень безопасности миллионам пользователям.</text:span><text:span text:style-name="T1"/></text:p>
      <text:p text:style-name="P24" loext:marker-style-name="T1"><text:span text:style-name="T1"><text:tab/>Для образовательных учреждений:</text:span><text:span text:style-name="T1"/></text:p>
      <text:p text:style-name="P24" loext:marker-style-name="T1"><text:span text:style-name="T1">Проект обладает значительным образовательным потенциалом. Может использоваться в курсах по кибербезопасности для демонстрации методов обнаружения фишинга, для изучении работы API.</text:span><text:span text:style-name="T1"/></text:p>
      <text:p text:style-name="P24" loext:marker-style-name="T1"><text:span text:style-name="T1"><text:tab/>Таким образом, этот инструмент должен быть таким же удобным и естественным в использовании, как общение в мессенджерах, но при этом обладать способностью мгновенно распознавать угрозы, что в настоящее время под силу только крупным корпорациям или требует значительных затрат времени и усилий. Данный бот заполняет важную нишу в сфере информационной безопасности для обычных пользователей, значительно повышая уровень их защиты.</text:span><text:span text:style-name="T1"/></text:p>
      <text:p text:style-name="P22" loext:marker-style-name="T6"><text:span text:style-name="T16">Практическая часть</text:span><text:span text:style-name="T16"/></text:p>
      <text:p text:style-name="P31" loext:marker-style-name="T15"><text:span text:style-name="T15">Описание проектного решения</text:span><text:span text:style-name="T15"/></text:p>
      <text:p text:style-name="P18" loext:marker-style-name="T2"><text:span text:style-name="T2">Это Telegram-бот, который выполняет проверку ссылок. Он работает как обычный бот, используя промышленный движок VirusTotal для анализа, но предоставляет результат в простой и мгновенной форме внутри мессенджера (Приложение Рисунок 1). Его структура полностью написана на языке программирования Python 3.10. В коде используются такие библиотеки, как aiogram, requests, asyncio, отвечающие за настройку бота в Telegram и выполнение HTTP-запросов к внешним API (Приложение Рисунок 2). </text:span><text:span text:style-name="T2"/></text:p>
      <text:p text:style-name="P18" loext:marker-style-name="T2"><text:span text:style-name="T2">Почему именно эти библиотеки?</text:span><text:span text:style-name="T2"/></text:p>
      <text:p text:style-name="P18" loext:marker-style-name="T2"><text:span text:style-name="T2">Aiogram:</text:span><text:span text:style-name="T2"/></text:p>
      <text:list text:style-name="WWNum7">
        <text:list-item>
          <text:p text:style-name="P32" loext:marker-style-name="T2"><text:span text:style-name="T2">Aiogram максимально полно и быстро реализует все методы и типы объектов Telegram Bot API в отличие от pyTelegramBotAPI. </text:span><text:span text:style-name="T2"/></text:p>
        </text:list-item>
        <text:list-item>
          <text:p text:style-name="P32" loext:marker-style-name="T2"><text:span text:style-name="T2">Регистрация обработчиков через декораторы (@dp.message_handler()) делает код структурированным и легко поддерживаемым.</text:span><text:span text:style-name="T2"/></text:p>
        </text:list-item>
      </text:list>
      <text:p text:style-name="P18" loext:marker-style-name="T2"><text:span text:style-name="T2">Asynciо:</text:span><text:span text:style-name="T2"/></text:p>
      <text:list text:style-name="WWNum8">
        <text:list-item>
          <text:p text:style-name="P33" loext:marker-style-name="T2"><text:span text:style-name="T2">Это стандартная библиотека Python (начиная с версии 3.4), предназначенная для написания параллельного кода с использованием синтаксиса async/await, aiogram построен поверх неё.</text:span><text:span text:style-name="T2"/></text:p>
        </text:list-item>
        <text:list-item>
          <text:p text:style-name="P33" loext:marker-style-name="T2"><text:span text:style-name="T2">Асинхронность позволяет боту эффективно обрабатывать тысячи запросов одновременно, не блокируя выполнение на время ожидания. Из-за этого бот становится гораздо более отзывчивым и масштабируемым.</text:span><text:span text:style-name="T2"/></text:p>
        </text:list-item>
      </text:list>
      <text:p text:style-name="P17" loext:marker-style-name="T15"><text:span text:style-name="T15">Принцип работы</text:span><text:span text:style-name="T15"/></text:p>
      <text:p text:style-name="P18" loext:marker-style-name="T2"><text:span text:style-name="T2">Получить доступ к боту можно по публичному имени @PhishCheckerbyanyyprklBot или по ссылке </text:span><text:a xlink:type="simple" xlink:href="https://t.me/PhishCheckerbyanyyprklBot" text:style-name="Internet_20_link" text:visited-style-name="Visited_20_Internet_20_Link"><text:span text:style-name="Internet_20_link"><text:span text:style-name="T2">https://t.me/PhishCheckerbyanyyprklBot</text:span></text:span></text:a><text:span text:style-name="T2">. Бот запускается командой /start в личном чате с ботом. Обратная связь с разработчиком осуществляется через консоль, где выводятся сообщения об удачном или неудачном запуске бота (Приложение Рисунок 3). Далее пользователь получает сообщение с правилами пользования ботом: </text:span></text:p>
      <text:p text:style-name="P18" loext:marker-style-name="T2"><text:span text:style-name="T2">«привет! это бот для проверки ссылок.</text:span><text:span text:style-name="T2"/></text:p>
      <text:p text:style-name="P18" loext:marker-style-name="T2"><text:span text:style-name="T2">пользователи интернета часто переходят по подозрительным ссылкам, </text:span><text:span text:style-name="T2"/></text:p>
      <text:p text:style-name="P18" loext:marker-style-name="T2"><text:span text:style-name="T2">этот бот прекрасное решение проблемы!</text:span><text:span text:style-name="T2"/></text:p>
      <text:p text:style-name="P18" loext:marker-style-name="T2"><text:span text:style-name="T2">просто скинь ссылку или напиши /check ссылка</text:span><text:span text:style-name="T2"/></text:p>
      <text:p text:style-name="P18" loext:marker-style-name="T2"><text:span text:style-name="T2">команды:</text:span><text:span text:style-name="T2"/></text:p>
      <text:p text:style-name="P18" loext:marker-style-name="T2"><text:span text:style-name="T2">/start - начало</text:span><text:span text:style-name="T2"/></text:p>
      <text:p text:style-name="P18" loext:marker-style-name="T2"><text:span text:style-name="T2">/check ссылка - проверить ссылку</text:span><text:span text:style-name="T2"/></text:p>
      <text:p text:style-name="P18" loext:marker-style-name="T2"><text:span text:style-name="T2">/help — помощь» Затем пользователь отправляет ссылку боту. Бот из текста, отправленного пользователем, извлекает URL-адрес. который отправляется в VirusTotal API. Полученный JSON-отчёт анализируется по набору правил: репутация домена, результаты сканирования 70+ антивирусов, данные о поведении. На основе анализа формируется понятный вердикт, который бот отправляет обратно пользователю:</text:span><text:span text:style-name="T2"/></text:p>
      <text:p text:style-name="P24" loext:marker-style-name="T2"><text:span text:style-name="T2">«проверка завершена </text:span><text:span text:style-name="T2"/></text:p>
      <text:p text:style-name="P24" loext:marker-style-name="T2"><text:span text:style-name="T2">все хорошо! выглядит безопасно!</text:span><text:span text:style-name="T2"/></text:p>
      <text:p text:style-name="P24" loext:marker-style-name="T2"><text:span text:style-name="T2">совет: всегда проверяй ссылки))» в случае если ссылка не несет угроз, или:</text:span><text:span text:style-name="T2"/></text:p>
      <text:p text:style-name="P24" loext:marker-style-name="T2"><text:span text:style-name="T2">«будь осторожен!», «не переходи!», в зависимости от результата полученного от VirusTotal. </text:span><text:span text:style-name="T2"/></text:p>
      <text:p text:style-name="P24" loext:marker-style-name="T2"><text:span text:style-name="T2"><text:tab/>Таким образом, решение представляет собой практичную и эффективную реализацию идеи проверки ссылок, превращая мощь корпоративных инструментов кибербезопасности в простую и доступную повседневную привычку внутри Telegram.</text:span><text:span text:style-name="T2"/></text:p>
      <text:p text:style-name="P17" loext:marker-style-name="T6"><text:span text:style-name="T8">Заключение</text:span><text:span text:style-name="T8"/></text:p>
      <text:p text:style-name="P18" loext:marker-style-name="T1"><text:span text:style-name="T1">Разработанный Telegram-бот представляет собой инновационное решение, которое эффективно справляется с задачей верификации ссылок в мессенджерах. Этот инструмент объединяет простоту использования с передовыми функциональными возможностями, что соответствует современным требованиям в области кибербезопасности.</text:span><text:span text:style-name="T1"/></text:p>
      <text:p text:style-name="P18" loext:marker-style-name="T1"><text:span text:style-name="T1">В условиях растущей сложности киберугроз и увеличения частоты фишинговых атак подобные решения становятся важными компонентами цифровой экосистемы. Представленная разработка заполняет существенный пробел в цепочке обеспечения безопасности между антивирусным программным обеспечением и человеческим фактором, предоставляя защиту на этапе принятия решения о переходе по ссылке.</text:span><text:span text:style-name="T1"/></text:p>
      <text:p text:style-name="P18" loext:marker-style-name="T1"><text:span text:style-name="T1">У бота также есть перспектива. В будущем для более широкого пользования планируется разработать бот для других мессенджеров, таких как </text:span><text:span text:style-name="T17">MAX</text:span><text:span text:style-name="T1">, </text:span><text:span text:style-name="T17">Vk</text:span><text:span text:style-name="T1">, </text:span><text:span text:style-name="T17">WhatsApp</text:span><text:span text:style-name="T1">. А так же добавить автоматизацию боту, то есть убрать <text:s/>необходимость пересылать ему сообщения, а просто добавлять в чат или группу.</text:span></text:p>
      <text:p text:style-name="P18" loext:marker-style-name="T1"><text:span text:style-name="T1">Таким образом, данный проект обладает не только технической, но и социальной значимостью, способствуя созданию более безопасной цифровой среды для всех пользователей сети Интернет.</text:span><text:span text:style-name="T1"/></text:p>
      <text:p text:style-name="P17" loext:marker-style-name="T1"><text:span text:style-name="T8">Список литературы</text:span><text:span text:style-name="T8"/></text:p>
      <text:list text:style-name="WWNum3">
        <text:list-item>
          <text:p text:style-name="P34" loext:marker-style-name="T1"><text:span text:style-name="T1">Официальная документация Telegram Bot API [Электронный ресурс]. – Режим доступа: https://core.telegram.org/bots/api.</text:span><text:span text:style-name="T1"/></text:p>
        </text:list-item>
        <text:list-item>
          <text:p text:style-name="P34" loext:marker-style-name="T1"><text:span text:style-name="T1">VirusTotal API v3 Public Documentation [Электронный ресурс]. – Режим доступа: https://docs.virustotal.com/reference/overview .</text:span><text:span text:style-name="T1"/></text:p>
        </text:list-item>
        <text:list-item>
          <text:p text:style-name="P34" loext:marker-style-name="T1"><text:span text:style-name="T1">Google Safe Browsing API Documentation [Электронный ресурс]. – Режим доступа: https://developers.google.com/safe-browsing/v4.</text:span><text:span text:style-name="T1"/></text:p>
        </text:list-item>
        <text:list-item>
          <text:p text:style-name="P34" loext:marker-style-name="T1"><text:span text:style-name="T1">PhishTank Developer Info [Электронный ресурс]. – Режим доступа: https://phishtank.org/developer_info.php.</text:span><text:span text:style-name="T1"/></text:p>
        </text:list-item>
        <text:list-item>
          <text:p text:style-name="P34" loext:marker-style-name="T1"><text:span text:style-name="T1">OpenPhish Feed Documentation [Электронный ресурс]. – Режим доступа: https://openphish.com/feed.txt.</text:span><text:span text:style-name="T1"/></text:p>
        </text:list-item>
        <text:list-item>
          <text:p text:style-name="P34" loext:marker-style-name="T1"><text:span text:style-name="T1">Кибербезопасность: защита от фишинга и социальной инженерии / И. Сидоров. – СПб.: БХВ-Петербург, 2021. – 320 с. – ISBN 978-5-9775-6789-2.</text:span><text:span text:style-name="T1"/></text:p>
        </text:list-item>
        <text:list-item>
          <text:p text:style-name="P34" loext:marker-style-name="T1"><text:span text:style-name="T1">REST API: разработка и интеграция веб-сервисов / М. Иванов. – М.: Питер, 2020. – 256 с. – ISBN 978-5-4461-1456-7.</text:span><text:span text:style-name="T1"/></text:p>
        </text:list-item>
        <text:list-item>
          <text:p text:style-name="P34" loext:marker-style-name="T1"><text:span text:style-name="T1">Методы кэширования данных в высоконагруженных приложениях / С. Козлов // Программирование и системы. – 2022. – № 3. – С. 78-85.</text:span><text:span text:style-name="T1"/></text:p>
        </text:list-item>
        <text:list-item>
          <text:p text:style-name="P34" loext:marker-style-name="T1"><text:span text:style-name="T1">Python: создание приложений с использованием API / Р. Харрисон. – М.: Эксмо, 2021. – 384 с. – ISBN 978-5-04-123456-7.</text:span><text:span text:style-name="T1"/></text:p>
        </text:list-item>
        <text:list-item>
          <text:p text:style-name="P34" loext:marker-style-name="T1"><text:span text:style-name="T1">Принципы проектирования безопасных чат-ботов / Е. Фролова // Труды конференции "Информационные технологии и системы". – 2023. – С. 112-118.</text:span><text:span text:style-name="T1"/></text:p>
        </text:list-item>
        <text:list-item>
          <text:p text:style-name="P34" loext:marker-style-name="T1"><text:span text:style-name="T1">Верификация URL: методы и алгоритмы / К. Новиков // Компьютерные исследования и моделирование. – 2021. – Т. 13, № 5. – С. 1023-1035.</text:span><text:span text:style-name="T1"/></text:p>
        </text:list-item>
      </text:list>
      <text:p text:style-name="P35" loext:marker-style-name="T8"><text:span text:style-name="T8">Приложение </text:span><text:span text:style-name="T8"/></text:p>
      <text:p text:style-name="P36" loext:marker-style-name="T8"><draw:custom-shape text:anchor-type="char" draw:z-index="2" draw:name="Врезка2" draw:style-name="gr1" draw:text-style-name="P39" svg:width="17.172cm" svg:height="20.27cm" svg:x="0.265cm" svg:y="0.349cm"><text:p text:style-name="Drawing" loext:marker-style-name="T18"><draw:frame draw:style-name="fr1" draw:name="Изображение1" text:anchor-type="as-char" svg:width="16.122cm" svg:height="15.612cm" draw:z-index="7"><draw:image xlink:href="Pictures/1000000100000302000002D04BF0BE1B.png" xlink:type="simple" xlink:show="embed" xlink:actuate="onLoad" draw:mime-type="image/png"/></draw:frame></text:p><text:p text:style-name="P37" loext:marker-style-name="T18"><text:span text:style-name="T19">Рисунок </text:span><text:span text:style-name="T19"><text:sequence text:ref-name="refDrawing0" text:name="Drawing" text:formula="ooow:Drawing+1" style:num-format="1">1</text:sequence></text:span></text:p><text:p text:style-name="P38" loext:marker-style-name="T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 loext:marker-style-name="T8"/>
      <text:p text:style-name="P36" loext:marker-style-name="T8"/>
      <text:p text:style-name="P36" loext:marker-style-name="T8"/>
      <text:p text:style-name="P40" loext:marker-style-name="T8"><text:soft-page-break/><draw:custom-shape text:anchor-type="as-char" draw:z-index="0" draw:name="Врезка2" draw:style-name="gr2" draw:text-style-name="P42" svg:width="14.779cm" svg:height="8.732cm"><text:p text:style-name="P41" loext:marker-style-name="T18"><draw:frame draw:style-name="fr1" draw:name="Изображение3" text:anchor-type="as-char" svg:width="14.778cm" svg:height="8.163cm" draw:z-index="6"><draw:image xlink:href="Pictures/10000001000002490000016831DCFD55.png" xlink:type="simple" xlink:show="embed" xlink:actuate="onLoad" draw:mime-type="image/png"/></draw:frame><text:span text:style-name="T19">Рисунок </text:span><text:span text:style-name="T19"><text:sequence text:ref-name="refDrawing1" text:name="Drawing" text:formula="ooow:Drawing+1" style:num-format="1">2</text:sequenc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as-char" draw:z-index="1" draw:name="Врезка3" draw:style-name="gr3" draw:text-style-name="P42" svg:width="17.28cm" svg:height="9.284cm"><text:p text:style-name="P41" loext:marker-style-name="T18"><draw:frame draw:style-name="fr1" draw:name="Изображение2" text:anchor-type="as-char" svg:width="17.279cm" svg:height="9.128cm" draw:z-index="8"><draw:image xlink:href="Pictures/100000010000028D00000159652D5E07.png" xlink:type="simple" xlink:show="embed" xlink:actuate="onLoad" draw:mime-type="image/png"/></draw:frame><text:span text:style-name="T19">Рисунок </text:span><text:span text:style-name="T19"><text:sequence text:ref-name="refDrawing2" text:name="Drawing" text:formula="ooow:Drawing+1" style:num-format="1">3</text:sequenc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Колонтитулы" style:family="paragraph" style:parent-style-name="Standard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rawing" style:family="paragraph" style:parent-style-name="Caption" style:class="extra"/>
    <style:style style:name="Содержимое_20_врезки" style:display-name="Содержимое врезки" style:family="paragraph" style:parent-style-name="Standard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Маркеры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  <text:p text:style-name="Header"/>
      </style:header-first>
      <style:footer>
        <text:p text:style-name="MP2" loext:marker-style-name="MT1"><text:span text:style-name="MT1"><text:page-number text:select-page="current">13</text:page-number></text:span></text:p>
        <text:p text:style-name="Footer"/>
      </style:footer>
      <style:footer-first>
        <text:p text:style-name="MP3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6:36:00</meta:creation-date>
    <meta:initial-creator>Анна</meta:initial-creator>
    <dc:language>ru-RU</dc:language>
    <meta:print-date>2025-12-10T21:30:48</meta:print-date>
    <dc:date>2026-01-15T13:23:51.683203400</dc:date>
    <meta:editing-cycles>25</meta:editing-cycles>
    <meta:editing-duration>PT2H28M17S</meta:editing-duration>
    <meta:generator>LibreOffice/25.2.7.2$Windows_X86_64 LibreOffice_project/5cbfd1ab6520636bb5f7b99185aa69bd7456825d</meta:generator>
    <meta:document-statistic meta:table-count="0" meta:image-count="3" meta:object-count="0" meta:page-count="13" meta:paragraph-count="108" meta:word-count="1532" meta:character-count="12540" meta:non-whitespace-character-count="11100"/>
    <meta:user-defined meta:name="AppVersion">15.0000</meta:user-defined>
    <meta:template xlink:type="simple" xlink:actuate="onRequest" xlink:title="Normal" xlink:href=""/>
  </office:meta>
</office:document-meta>
</file>