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5e3" officeooo:paragraph-rsid="00136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ктуальность проблемы</text:p>
      <text:p text:style-name="P1">Фишинг (от английского phishing, созвучного с fishing — «рыбная ловля, выуживание») — вид интернет-мошенничества, при котором злоумышленники пытаются выманить конфиденциальные сведения.</text:p>
      <text:p text:style-name="P1">Фишинг в мессенджерах и соцсетях — сообщения от взломанных аккаунтов или фейковых профилей с фишинговыми ссылками.</text:p>
      <text:p text:style-name="P1">Смс-фишинг (смишинг) — короткие сообщения со ссылками, обещающие призы, скидки или требующие оплаты.</text:p>
      <text:p text:style-name="P1">Почему фишинг — «лидер среди схем мошенничества»</text:p>
      <text:p text:style-name="P1"><text:s/>• Согласно глобальным отчётам за 2024–2025 годы, число фишинговых попыток постоянно растёт. <text:s/></text:p>
      <text:p text:style-name="P1"><text:s/>• Например: по данным международной компании, в 2024 году они заблокировали около 893 миллионов попыток фишинга — на 26 % больше, чем в 2023 году.</text:p>
      <text:p text:style-name="P1">Объём фишинг-атак продолжает расти: в отчётах за май 2024–апрель 2025 зафиксировано больше уникальных доменов, URL-адресов и попыток по сравнению с предыдущим периодом. Из-за масштабности и простоты распространения фишинга — рост числа жертв, увеличиваются финансовые потери, особенно среди тех, кто не пользуется многоступенчатой аутентификацией и базовой киберграмотностью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1:30:48.206320500</meta:creation-date>
    <dc:date>2025-12-07T22:34:26.980510100</dc:date>
    <meta:editing-duration>PT37M29S</meta:editing-duration>
    <meta:editing-cycles>1</meta:editing-cycles>
    <meta:document-statistic meta:table-count="0" meta:image-count="0" meta:object-count="0" meta:page-count="1" meta:paragraph-count="8" meta:word-count="137" meta:character-count="1084" meta:non-whitespace-character-count="946"/>
    <meta:generator>LibreOffice/25.2.7.2$Windows_X86_64 LibreOffice_project/5cbfd1ab6520636bb5f7b99185aa69bd7456825d</meta:generator>
  </office:meta>
</office:document-meta>
</file>